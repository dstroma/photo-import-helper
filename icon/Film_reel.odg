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6000002074218E583.png" manifest:media-type="image/png"/>
  <manifest:file-entry manifest:full-path="Pictures/100048730000373B000035A25515D9DE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hroma" svg:font-family="Michr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fo:min-height="14.99cm" fo:min-width="19.82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09cm" loext:decorative="false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style:font-name="Michroma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end"/>
      <style:text-properties style:font-name="Michroma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Michrom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5.2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138cm" svg:height="13.729cm" svg:x="2.54cm" svg:y="0.635cm">
          <draw:image xlink:href="Pictures/100048730000373B000035A25515D9DE.svg" xlink:type="simple" xlink:show="embed" xlink:actuate="onLoad" draw:mime-type="image/svg+xml">
            <text:p/>
          </draw:image>
          <draw:image xlink:href="Pictures/1000000100000216000002074218E583.png" xlink:type="simple" xlink:show="embed" xlink:actuate="onLoad" draw:mime-type="image/png"/>
        </draw:frame>
        <draw:frame draw:style-name="gr3" draw:text-style-name="P4" draw:layer="layout" svg:width="16.827cm" svg:height="2.059cm" svg:x="2.857cm" svg:y="12.065cm">
          <draw:text-box>
            <text:p text:style-name="P3"><text:span text:style-name="T1">MOVIE FI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hroma" svg:font-family="Michr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16:02:32.504717203</dc:date>
    <meta:editing-duration>PT4M</meta:editing-duration>
    <meta:editing-cycles>1</meta:editing-cycles>
    <meta:document-statistic meta:object-count="3"/>
    <meta:generator>LibreOffice/24.8.1.2$Linux_X86_64 LibreOffice_project/480$Build-2</meta:generator>
  </office:meta>
</office:document-meta>
</file>